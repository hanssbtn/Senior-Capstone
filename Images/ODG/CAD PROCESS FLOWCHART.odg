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35cm" fo:min-width="1.21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93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14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cm" fo:min-width="3.31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735cm" fo:min-width="7.438cm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5.99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4.40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21cm" fo:min-width="2.39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16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1cm" fo:min-width="2.12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6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xml:id="id7" draw:id="id7" draw:layer="layout" svg:width="1.905cm" svg:height="0.971cm" svg:x="4.175cm" svg:y="2.152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" draw:style-name="gr2" draw:text-style-name="P2" xml:id="id9" draw:id="id9" draw:layer="layout" svg:width="1.588cm" svg:height="1cm" svg:x="4.658cm" svg:y="10.195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3" draw:text-style-name="P2" xml:id="id4" draw:id="id4" draw:layer="layout" svg:width="3.81cm" svg:height="1.364cm" svg:x="12.112cm" svg:y="1.952cm">
          <text:p text:style-name="P1"><text:span text:style-name="T1">Meeting using </text:span><text:span text:style-name="T1"><text:line-break/></text:span><text:span text:style-name="T1">collaborative to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4" draw:text-style-name="P2" xml:id="id5" draw:id="id5" draw:layer="layout" svg:width="7.622cm" svg:height="2.38cm" svg:x="1.635cm" svg:y="4.37cm">
          <text:p text:style-name="P1"><text:span text:style-name="T1">Needs CAD</text:span><text:span text:style-name="T1"><text:line-break/></text:span><text:span text:style-name="T1">model modificatio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layer="layout" svg:width="7.938cm" svg:height="6.985cm" svg:x="10.207cm" svg:y="4.492cm">
          <text:p/>
          <draw:enhanced-geometry svg:viewBox="0 0 21600 21600" draw:type="rectangle" draw:enhanced-path="M 0 0 L 21600 0 21600 21600 0 21600 0 0 Z N"/>
        </draw:custom-shape>
        <draw:custom-shape draw:name="Process 3" draw:style-name="gr6" draw:text-style-name="P2" xml:id="id1" draw:id="id1" draw:layer="layout" svg:width="6.493cm" svg:height="1.27cm" svg:x="10.917cm" svg:y="4.81cm">
          <text:p text:style-name="P1"><text:span text:style-name="T1">Define the new </text:span><text:span text:style-name="T1"><text:line-break/></text:span><text:span text:style-name="T1">objectives of the design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7" draw:text-style-name="P2" xml:id="id2" draw:id="id2" draw:layer="layout" svg:width="4.905cm" svg:height="1.27cm" svg:x="11.717cm" svg:y="6.732cm">
          <text:p text:style-name="P1"><text:span text:style-name="T1">Modify the </text:span><text:span text:style-name="T1"><text:line-break/></text:span><text:span text:style-name="T1">CAD mod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" draw:style-name="gr8" draw:text-style-name="P4" draw:layer="layout" svg:x1="14.164cm" svg:y1="6.08cm" svg:x2="14.17cm" svg:y2="6.732cm" draw:start-shape="id1" draw:start-glue-point="6" draw:end-shape="id2" draw:end-glue-point="4" svg:d="M14164 6080v327h6v325" svg:viewBox="0 0 7 653">
          <text:p/>
        </draw:connector>
        <draw:custom-shape draw:name="Data" draw:style-name="gr9" draw:text-style-name="P2" xml:id="id6" draw:id="id6" draw:layer="layout" svg:width="4.763cm" svg:height="1.37cm" svg:x="7.032cm" svg:y="1.952cm">
          <text:p text:style-name="P1"><text:span text:style-name="T1">First CAD</text:span><text:span text:style-name="T1"><text:line-break/></text:span><text:span text:style-name="T1">model vers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1" draw:style-name="gr10" draw:text-style-name="P2" xml:id="id8" draw:id="id8" draw:layer="layout" svg:width="4.381cm" svg:height="2cm" svg:x="3.261cm" svg:y="7.477cm">
          <text:p text:style-name="P1"><text:span text:style-name="T1">Last CAD</text:span><text:span text:style-name="T1"><text:line-break/></text:span><text:span text:style-name="T1">model vers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2" draw:style-name="gr11" draw:text-style-name="P2" xml:id="id3" draw:id="id3" draw:layer="layout" svg:width="4.318cm" svg:height="1.27cm" svg:x="12.012cm" svg:y="8.725cm">
          <text:p text:style-name="P1"><text:span text:style-name="T1">CAD model </text:span><text:span text:style-name="T1"><text:line-break/></text:span><text:span text:style-name="T1">version N+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-Standard 1" draw:style-name="gr12" draw:text-style-name="P4" draw:layer="layout" svg:x1="14.17cm" svg:y1="8.002cm" svg:x2="14.171cm" svg:y2="8.725cm" draw:start-shape="id2" draw:start-glue-point="6" draw:end-shape="id3" draw:end-glue-point="5" svg:d="M14170 8002v362h1v361" svg:viewBox="0 0 2 724">
          <text:p/>
        </draw:connector>
        <draw:custom-shape draw:name="Process 2" draw:style-name="gr13" draw:text-style-name="P2" draw:layer="layout" svg:width="6.81cm" svg:height="0.635cm" svg:x="10.9cm" svg:y="10.442cm">
          <text:p text:style-name="P1"><text:span text:style-name="T1">Modification + Implement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5" draw:layer="layout" draw:line-skew="1.934cm" svg:x1="15.891cm" svg:y1="9.36cm" svg:x2="15.922cm" svg:y2="2.634cm" draw:start-shape="id3" draw:start-glue-point="9" draw:end-shape="id4" draw:end-glue-point="7" svg:d="M15891 9360h2889v-6726h-2858" svg:viewBox="0 0 2890 6727">
          <text:p/>
        </draw:connector>
        <draw:connector draw:style-name="gr15" draw:text-style-name="P5" draw:layer="layout" svg:x1="14.017cm" svg:y1="3.316cm" svg:x2="5.446cm" svg:y2="4.37cm" draw:start-shape="id4" draw:start-glue-point="6" draw:end-shape="id5" draw:end-glue-point="4" svg:d="M14017 3316v528h-8571v526" svg:viewBox="0 0 8572 1055">
          <text:p/>
        </draw:connector>
        <draw:connector draw:style-name="gr16" draw:text-style-name="P5" draw:layer="layout" svg:x1="11.31cm" svg:y1="2.637cm" svg:x2="12.112cm" svg:y2="2.634cm" draw:start-shape="id6" draw:start-glue-point="9" draw:end-shape="id4" draw:end-glue-point="5" svg:d="M11310 2637h644v-3h158" svg:viewBox="0 0 803 4">
          <text:p/>
        </draw:connector>
        <draw:connector draw:style-name="gr17" draw:text-style-name="P5" draw:layer="layout" svg:x1="6.08cm" svg:y1="2.638cm" svg:x2="7.508cm" svg:y2="2.637cm" draw:start-shape="id7" draw:start-glue-point="7" draw:end-shape="id6" draw:end-glue-point="6" svg:d="M6080 2638h476v-1h952" svg:viewBox="0 0 1429 2">
          <text:p/>
        </draw:connector>
        <draw:connector draw:style-name="gr18" draw:text-style-name="P5" draw:layer="layout" svg:x1="5.446cm" svg:y1="6.75cm" svg:x2="5.452cm" svg:y2="7.477cm" draw:start-shape="id5" draw:start-glue-point="6" draw:end-shape="id8" draw:end-glue-point="5" svg:d="M5446 6750v364h6v363" svg:viewBox="0 0 7 728">
          <text:p/>
        </draw:connector>
        <draw:connector draw:style-name="gr19" draw:text-style-name="P5" draw:layer="layout" svg:x1="5.452cm" svg:y1="9.477cm" svg:x2="5.452cm" svg:y2="10.195cm" draw:start-shape="id8" draw:start-glue-point="8" draw:end-shape="id9" draw:end-glue-point="4" svg:d="M5452 9477v718" svg:viewBox="0 0 1 71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20:08:15.374572158</meta:creation-date>
    <dc:date>2026-01-07T20:27:53.302444318</dc:date>
    <meta:editing-duration>PT6M13S</meta:editing-duration>
    <meta:editing-cycles>1</meta:editing-cycles>
    <meta:document-statistic meta:object-count="19"/>
    <meta:generator>LibreOffice/25.8.1.1$Linux_X86_64 LibreOffice_project/580$Build-1</meta:generator>
  </office:meta>
</office:document-meta>
</file>