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0.646cm" fo:min-width="2.07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opacity="0%" draw:textarea-vertical-align="middle" draw:auto-grow-height="false" fo:min-height="1.02cm" fo:min-width="3.627cm" style:writing-mode="lr-tb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loext:decorative="false"/>
    </style:style>
    <style:style style:name="gr4" style:family="graphic" style:parent-style-name="objectwithoutfill">
      <style:graphic-properties draw:opacity="0%" draw:textarea-vertical-align="middle" draw:auto-grow-height="false" fo:min-height="1.02cm" fo:min-width="4.262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679cm" fo:min-width="2.07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1.751cm" fo:min-width="1.67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1.433cm" fo:min-width="1.51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objectwithoutfill">
      <style:graphic-properties draw:opacity="0%" draw:textarea-vertical-align="middle" draw:auto-grow-height="false" fo:min-height="1.02cm" fo:min-width="2.878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862cm" fo:min-width="2.14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762cm" fo:min-width="1.08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objectwithoutfill">
      <style:graphic-properties draw:opacity="0%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60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16" style:family="graphic" style:parent-style-name="objectwithoutfill">
      <style:graphic-properties draw:opacity="0%" draw:textarea-vertical-align="middle" draw:auto-grow-height="false" fo:min-height="1.02cm" fo:min-width="2.99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7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719cm" loext:decorative="false"/>
      <style:paragraph-properties style:writing-mode="lr-tb"/>
    </style:style>
    <style:style style:name="gr1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1.433cm" fo:min-width="1.51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152cm" draw:marker-start-center="false" draw:marker-end="Arrowheads_20_7" draw:marker-end-width="0.305cm" draw:marker-end-center="false" draw:fill="none" draw:fill-color="#ffffff" draw:textarea-horizontal-align="justify" fo:padding-top="0.11cm" fo:padding-bottom="0.11cm" fo:padding-left="0.235cm" fo:padding-right="0.23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75cm" fo:min-width="0.68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152cm" draw:marker-start-center="false" draw:marker-end="Arrowheads_20_7" draw:marker-end-width="0.254cm" draw:marker-end-center="false" draw:fill="none" draw:fill-color="#ffffff" draw:textarea-horizontal-align="justify" fo:padding-top="0.11cm" fo:padding-bottom="0.11cm" fo:padding-left="0.235cm" fo:padding-right="0.23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152cm" draw:marker-start-center="false" draw:marker-end="Arrowheads_20_7" draw:marker-end-width="0.254cm" draw:marker-end-center="false" draw:fill="none" draw:fill-color="#ffffff" draw:textarea-horizontal-align="justify" fo:padding-top="0.11cm" fo:padding-bottom="0.11cm" fo:padding-left="0.235cm" fo:padding-right="0.23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7" style:family="graphic" style:parent-style-name="standard">
      <style:graphic-properties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.60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604cm" loext:decorative="false"/>
      <style:paragraph-properties style:writing-mode="lr-tb"/>
    </style:style>
    <style:style style:name="gr40" style:family="graphic" style:parent-style-name="standard">
      <style:graphic-properties draw:marker-end="Arrowheads_20_19" draw:marker-end-width="0.305cm" draw:textarea-vertical-align="middle" loext:decorative="false"/>
    </style:style>
    <style:style style:name="P1" style:family="paragraph">
      <style:paragraph-properties fo:text-align="center"/>
      <style:text-properties style:font-name="Times New Roman1" fo:font-size="14pt" style:font-size-asian="14pt" style:font-size-complex="14pt"/>
    </style:style>
    <style:style style:name="P2" style:family="paragraph">
      <loext:graphic-properties draw:opacity="0%"/>
      <style:paragraph-properties fo:text-align="center" style:writing-mode="lr-tb"/>
      <style:text-properties style:font-name="Times New Roman1" fo:font-size="14pt" style:font-size-asian="14pt" style:font-size-complex="14pt"/>
    </style:style>
    <style:style style:name="P3" style:family="paragraph">
      <style:paragraph-properties fo:text-align="center"/>
      <style:text-properties style:font-name="Times New Roman1" fo:font-size="14pt"/>
    </style:style>
    <style:style style:name="P4" style:family="paragraph">
      <loext:graphic-properties draw:opacity="0%"/>
      <style:paragraph-properties fo:text-align="center" style:writing-mode="lr-tb"/>
      <style:text-properties style:font-name="Times New Roman1" fo:font-size="14pt"/>
    </style:style>
    <style:style style:name="P5" style:family="paragraph">
      <style:paragraph-properties fo:text-align="center"/>
      <style:text-properties style:font-name="Times New Roman1"/>
    </style:style>
    <style:style style:name="P6" style:family="paragraph">
      <loext:graphic-properties draw:fill="none"/>
      <style:paragraph-properties fo:text-align="center"/>
      <style:text-properties style:font-name="Times New Roman1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</style:style>
    <style:style style:name="T1" style:family="text">
      <style:text-properties style:font-name="Times New Roman1"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8cm" svg:height="1.27cm" svg:x="1.562cm" svg:y="1.467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4.127cm" svg:height="1.27cm" svg:x="5.69cm" svg:y="1.467cm">
          <text:p text:style-name="P3"><text:span text:style-name="T1">Create target object 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type="line" svg:x1="4.42cm" svg:y1="2.102cm" svg:x2="5.69cm" svg:y2="2.102cm" draw:start-shape="id1" draw:start-glue-point="7" draw:end-shape="id2" draw:end-glue-point="5" svg:d="M4420 2102h1270" svg:viewBox="0 0 1271 1">
          <text:p/>
        </draw:connector>
        <draw:custom-shape draw:style-name="gr4" draw:text-style-name="P4" xml:id="id3" draw:id="id3" draw:layer="layout" svg:width="4.762cm" svg:height="1.27cm" svg:x="11.07cm" svg:y="1.467cm">
          <text:p text:style-name="P3"><text:span text:style-name="T1">Design annotation form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9.817cm" svg:y1="2.102cm" svg:x2="11.07cm" svg:y2="2.102cm" draw:start-shape="id2" draw:start-glue-point="7" draw:end-shape="id3" draw:end-glue-point="5" svg:d="M9817 2102h1253" svg:viewBox="0 0 1254 1">
          <text:p/>
        </draw:connector>
        <draw:custom-shape draw:style-name="gr4" draw:text-style-name="P4" xml:id="id4" draw:id="id4" draw:layer="layout" svg:width="4.762cm" svg:height="1.27cm" svg:x="17.102cm" svg:y="1.467cm">
          <text:p text:style-name="P3"><text:span text:style-name="T1">Combine dataset sourc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15.832cm" svg:y1="2.102cm" svg:x2="17.102cm" svg:y2="2.102cm" draw:start-shape="id3" draw:start-glue-point="7" draw:end-shape="id4" draw:end-glue-point="5" svg:d="M15832 2102h1270" svg:viewBox="0 0 1271 1">
          <text:p/>
        </draw:connector>
        <draw:custom-shape draw:name="Start-End" draw:style-name="gr6" draw:text-style-name="P8" xml:id="id14" draw:id="id14" draw:layer="layout" svg:width="2.858cm" svg:height="1.317cm" svg:x="12.257cm" svg:y="9.652cm">
          <text:p text:style-name="P7"><text:span text:style-name="T2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" draw:style-name="gr7" draw:text-style-name="P10" xml:id="id15" draw:id="id15" draw:layer="layout" svg:width="3.576cm" svg:height="2cm" svg:x="22.92cm" svg:y="1.102cm">
          <text:p text:style-name="P9"><text:span text:style-name="T3">Raw CAD </text:span></text:p>
          <text:p text:style-name="P9"><text:span text:style-name="T2">fil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ata 1" draw:style-name="gr8" draw:text-style-name="P10" xml:id="id11" draw:id="id11" draw:layer="layout" svg:width="3.319cm" svg:height="1.683cm" svg:x="1.152cm" svg:y="6.766cm">
          <text:p text:style-name="P9"><text:span text:style-name="T3">Raw STEP</text:span><text:span text:style-name="T3"><text:line-break/></text:span><text:span text:style-name="T3">Fil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4" xml:id="id9" draw:id="id9" draw:layer="layout" svg:width="3.378cm" svg:height="1.27cm" svg:x="22.641cm" svg:y="4.175cm">
          <text:p text:style-name="P3"><text:span text:style-name="T1">Filter using PythonOC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" draw:style-name="gr10" draw:text-style-name="P12" xml:id="id8" draw:id="id8" draw:layer="layout" svg:width="3cm" svg:height="2cm" svg:x="17.896cm" svg:y="3.804cm">
          <text:p text:style-name="P11"><text:span text:style-name="T4">Is in lis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1" draw:style-name="gr11" draw:text-style-name="P12" xml:id="id7" draw:id="id7" draw:layer="layout" svg:width="5.297cm" svg:height="2.223cm" svg:x="11.054cm" svg:y="3.689cm">
          <text:p text:style-name="P11"><text:span text:style-name="T4">Has 100 </text:span><text:span text:style-name="T4"><text:line-break/></text:span><text:span text:style-name="T4">unique instanc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2" draw:style-name="gr12" draw:text-style-name="P12" xml:id="id5" draw:id="id5" draw:layer="layout" svg:width="3.175cm" svg:height="2.023cm" svg:x="6.326cm" svg:y="3.789cm">
          <text:p text:style-name="P11"><text:span text:style-name="T4">Has </text:span></text:p>
          <text:p text:style-name="P11"><text:span text:style-name="T4">volum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4" xml:id="id6" draw:id="id6" draw:layer="layout" svg:width="3.175cm" svg:height="1.27cm" svg:x="1.234cm" svg:y="4.159cm">
          <text:p text:style-name="P3"><text:span text:style-name="T1">Keep in data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text-style-name="P13" draw:layer="layout" svg:width="1.107cm" svg:height="0.797cm" svg:x="19.507cm" svg:y="5.432cm">
          <draw:text-box>
            <text:p>No</text:p>
          </draw:text-box>
        </draw:frame>
        <draw:frame draw:style-name="gr14" draw:text-style-name="P13" draw:layer="layout" svg:width="1.107cm" svg:height="0.797cm" svg:x="13.692cm" svg:y="5.65cm">
          <draw:text-box>
            <text:p>No</text:p>
          </draw:text-box>
        </draw:frame>
        <draw:frame draw:style-name="gr15" draw:text-style-name="P13" draw:layer="layout" svg:width="1.107cm" svg:height="0.797cm" svg:x="7.985cm" svg:y="5.5cm">
          <draw:text-box>
            <text:p>No</text:p>
          </draw:text-box>
        </draw:frame>
        <draw:custom-shape draw:style-name="gr16" draw:text-style-name="P4" xml:id="id10" draw:id="id10" draw:layer="layout" svg:width="3.491cm" svg:height="1.27cm" svg:x="17.642cm" svg:y="6.877cm">
          <text:p text:style-name="P3"><text:span text:style-name="T1">Discard from data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xml:id="id12" draw:id="id12" draw:layer="layout" svg:width="3.175cm" svg:height="1.27cm" svg:x="6.339cm" svg:y="6.953cm">
          <text:p text:style-name="P3"><text:span text:style-name="T1">Annotate fi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13" draw:layer="layout" svg:width="1.223cm" svg:height="0.797cm" svg:x="17.168cm" svg:y="3.845cm">
          <draw:text-box>
            <text:p>Yes</text:p>
          </draw:text-box>
        </draw:frame>
        <draw:frame draw:style-name="gr18" draw:text-style-name="P13" draw:layer="layout" svg:width="1.223cm" svg:height="0.797cm" svg:x="10.136cm" svg:y="3.845cm">
          <draw:text-box>
            <text:p>Yes</text:p>
          </draw:text-box>
        </draw:frame>
        <draw:frame draw:style-name="gr17" draw:text-style-name="P13" draw:layer="layout" svg:width="1.223cm" svg:height="0.797cm" svg:x="5.374cm" svg:y="3.845cm">
          <draw:text-box>
            <text:p>Yes</text:p>
          </draw:text-box>
        </draw:frame>
        <draw:connector draw:style-name="gr19" draw:text-style-name="P14" draw:layer="layout" draw:type="line" svg:x1="6.326cm" svg:y1="4.8cm" svg:x2="4.409cm" svg:y2="4.794cm" draw:start-shape="id5" draw:end-shape="id6" draw:end-glue-point="7" svg:d="M6326 4800l-1917-6" svg:viewBox="0 0 1918 7">
          <text:p/>
        </draw:connector>
        <draw:connector draw:style-name="gr20" draw:text-style-name="P14" draw:layer="layout" draw:type="line" svg:x1="11.054cm" svg:y1="4.8cm" svg:x2="9.501cm" svg:y2="4.801cm" draw:start-shape="id7" draw:end-shape="id5" draw:end-glue-point="7" svg:d="M11054 4800l-1553 1" svg:viewBox="0 0 1554 2">
          <text:p/>
        </draw:connector>
        <draw:connector draw:style-name="gr21" draw:text-style-name="P14" draw:layer="layout" draw:type="line" svg:x1="17.896cm" svg:y1="4.804cm" svg:x2="16.351cm" svg:y2="4.801cm" draw:start-shape="id8" draw:end-shape="id7" draw:end-glue-point="7" svg:d="M17896 4804l-1545-3" svg:viewBox="0 0 1546 4">
          <text:p/>
        </draw:connector>
        <draw:connector draw:style-name="gr22" draw:text-style-name="P14" draw:layer="layout" draw:type="line" svg:x1="22.641cm" svg:y1="4.81cm" svg:x2="20.896cm" svg:y2="4.804cm" draw:start-shape="id9" draw:start-glue-point="5" draw:end-shape="id8" svg:d="M22641 4810l-1745-6" svg:viewBox="0 0 1746 7">
          <text:p/>
        </draw:connector>
        <draw:connector draw:style-name="gr23" draw:text-style-name="P14" draw:layer="layout" draw:type="line" svg:x1="19.396cm" svg:y1="5.804cm" svg:x2="19.387cm" svg:y2="6.877cm" draw:start-shape="id8" draw:end-shape="id10" svg:d="M19396 5804l-9 1073" svg:viewBox="0 0 10 1074">
          <text:p/>
        </draw:connector>
        <draw:connector draw:style-name="gr24" draw:text-style-name="P14" draw:layer="layout" draw:type="line" svg:x1="2.821cm" svg:y1="5.429cm" svg:x2="2.811cm" svg:y2="6.766cm" draw:start-shape="id6" draw:end-shape="id11" svg:d="M2821 5429l-10 1337" svg:viewBox="0 0 11 1338">
          <text:p/>
        </draw:connector>
        <draw:connector draw:style-name="gr25" draw:text-style-name="P14" draw:layer="layout" draw:type="line" svg:x1="4.133cm" svg:y1="7.607cm" svg:x2="6.339cm" svg:y2="7.588cm" draw:start-shape="id11" draw:start-glue-point="9" draw:end-shape="id12" draw:end-glue-point="5" svg:d="M4133 7607l2206-19" svg:viewBox="0 0 2207 20">
          <text:p/>
        </draw:connector>
        <draw:custom-shape draw:name="Data 2" draw:style-name="gr26" draw:text-style-name="P10" xml:id="id13" draw:id="id13" draw:layer="layout" svg:width="3.319cm" svg:height="1.683cm" svg:x="6.283cm" svg:y="9.484cm">
          <text:p text:style-name="P9"><text:span text:style-name="T3">Annotated </text:span><text:span text:style-name="T3"><text:line-break/></text:span><text:span text:style-name="T3">STEP Fil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7" draw:text-style-name="P14" draw:layer="layout" draw:type="lines" svg:x1="7.927cm" svg:y1="8.223cm" svg:x2="7.943cm" svg:y2="9.484cm" draw:start-shape="id12" draw:start-glue-point="6" draw:end-shape="id13" draw:end-glue-point="5" svg:d="M7927 8223v502l16 243v516" svg:viewBox="0 0 17 1262">
          <text:p/>
        </draw:connector>
        <draw:connector draw:style-name="gr28" draw:text-style-name="P14" draw:layer="layout" draw:type="lines" svg:x1="9.264cm" svg:y1="10.325cm" svg:x2="12.257cm" svg:y2="10.311cm" draw:start-shape="id13" draw:start-glue-point="9" draw:end-shape="id14" draw:end-glue-point="5" svg:d="M9264 10325h853l1625-14h515" svg:viewBox="0 0 2994 15">
          <text:p/>
        </draw:connector>
        <draw:connector draw:style-name="gr29" draw:text-style-name="P14" draw:layer="layout" draw:type="line" svg:x1="21.864cm" svg:y1="2.102cm" svg:x2="23.277cm" svg:y2="2.102cm" draw:start-shape="id4" draw:start-glue-point="7" draw:end-shape="id15" draw:end-glue-point="6" svg:d="M21864 2102h1413" svg:viewBox="0 0 1414 1">
          <text:p/>
        </draw:connector>
        <draw:connector draw:name="Connector-Standard" draw:style-name="gr30" draw:text-style-name="P15" draw:layer="layout" svg:x1="13.703cm" svg:y1="5.912cm" svg:x2="17.642cm" svg:y2="7.512cm" draw:start-shape="id7" draw:start-glue-point="6" draw:end-shape="id10" draw:end-glue-point="5" svg:d="M13703 5912v1600h3939" svg:viewBox="0 0 3940 1601">
          <text:p/>
        </draw:connector>
        <draw:connector draw:name="Connector-Standard 1" draw:style-name="gr31" draw:text-style-name="P15" draw:layer="layout" svg:x1="19.387cm" svg:y1="8.147cm" svg:x2="15.115cm" svg:y2="10.311cm" draw:start-shape="id10" draw:start-glue-point="6" draw:end-shape="id14" draw:end-glue-point="7" svg:d="M19387 8147v2164h-4272" svg:viewBox="0 0 4273 2165">
          <text:p/>
        </draw:connector>
        <draw:custom-shape draw:name="Decision 3" draw:style-name="gr32" draw:text-style-name="P12" xml:id="id16" draw:id="id16" draw:layer="layout" svg:width="3cm" svg:height="2cm" svg:x="27.67cm" svg:y="1.1cm">
          <text:p text:style-name="P11"><text:span text:style-name="T4">Is STEP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4" draw:style-name="gr33" draw:text-style-name="P12" xml:id="id17" draw:id="id17" draw:layer="layout" svg:width="2.365cm" svg:height="2cm" svg:x="31.972cm" svg:y="1.1cm">
          <text:p text:style-name="P11"><text:span text:style-name="T4">Is JSO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4" draw:text-style-name="P14" draw:layer="layout" svg:x1="30.67cm" svg:y1="2.1cm" svg:x2="31.972cm" svg:y2="2.1cm" draw:start-shape="id16" draw:start-glue-point="7" draw:end-shape="id17" draw:end-glue-point="5" svg:d="M30670 2100h1302" svg:viewBox="0 0 1303 1">
          <text:p/>
        </draw:connector>
        <draw:connector draw:style-name="gr34" draw:text-style-name="P14" draw:layer="layout" draw:type="line" svg:x1="26.132cm" svg:y1="2.102cm" svg:x2="27.67cm" svg:y2="2.1cm" draw:start-shape="id15" draw:start-glue-point="9" draw:end-shape="id16" draw:end-glue-point="5" svg:d="M26132 2102l1538-2" svg:viewBox="0 0 1539 3">
          <text:p/>
        </draw:connector>
        <draw:connector draw:name="Connector-Standard 3" draw:style-name="gr35" draw:text-style-name="P15" xml:id="id19" draw:id="id19" draw:layer="layout" svg:x1="29.17cm" svg:y1="3.1cm" svg:x2="26.019cm" svg:y2="4.81cm" draw:start-shape="id16" draw:start-glue-point="6" draw:end-shape="id9" draw:end-glue-point="7" svg:d="M29170 3100v1710h-3151" svg:viewBox="0 0 3152 1711">
          <text:p/>
        </draw:connector>
        <draw:custom-shape draw:style-name="gr9" draw:text-style-name="P4" xml:id="id18" draw:id="id18" draw:layer="layout" svg:width="3.378cm" svg:height="1.27cm" svg:x="31.459cm" svg:y="4.175cm">
          <text:p text:style-name="P3"><text:span text:style-name="T1">Convert to STE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2" draw:style-name="gr36" draw:text-style-name="P15" draw:layer="layout" draw:type="lines" svg:x1="33.155cm" svg:y1="3.1cm" svg:x2="33.148cm" svg:y2="4.175cm" draw:start-shape="id17" draw:start-glue-point="6" draw:end-shape="id18" draw:end-glue-point="4" svg:d="M33155 3100v266l-7 558v251" svg:viewBox="0 0 8 1076">
          <text:p/>
        </draw:connector>
        <draw:connector draw:style-name="gr37" draw:text-style-name="P16" draw:layer="layout" svg:x1="31.459cm" svg:y1="4.81cm" svg:x2="29.17cm" svg:y2="4.81cm" draw:start-shape="id18" draw:start-glue-point="5" draw:end-shape="id19" draw:end-glue-point="0" svg:d="M31459 4810h-2289" svg:viewBox="0 0 2290 1">
          <text:p/>
        </draw:connector>
        <draw:connector draw:style-name="gr37" draw:text-style-name="P16" draw:layer="layout" draw:line-skew="0cm -2.54cm" svg:x1="7.914cm" svg:y1="5.812cm" svg:x2="13.698cm" svg:y2="6.655cm" draw:start-shape="id5" draw:start-glue-point="6" svg:d="M7914 5812v680h5784v163" svg:viewBox="0 0 5785 844">
          <text:p/>
        </draw:connector>
        <draw:custom-shape draw:style-name="gr16" draw:text-style-name="P4" xml:id="id20" draw:id="id20" draw:layer="layout" svg:width="3.491cm" svg:height="1.27cm" svg:x="17.643cm" svg:y="6.877cm">
          <draw:glue-point draw:id="9" svg:x="-2.649cm" svg:y="-5.007cm"/>
          <text:p text:style-name="P3"><text:span text:style-name="T1">Discard from data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8" draw:text-style-name="P13" draw:layer="layout" svg:width="1.588cm" svg:height="1.343cm" svg:x="29.257cm" svg:y="2.905cm">
          <draw:text-box>
            <text:p>Yes</text:p>
          </draw:text-box>
        </draw:frame>
        <draw:frame draw:style-name="gr14" draw:text-style-name="P13" draw:layer="layout" svg:width="1.107cm" svg:height="0.797cm" svg:x="30.373cm" svg:y="1.317cm">
          <draw:text-box>
            <text:p>No</text:p>
          </draw:text-box>
        </draw:frame>
        <draw:frame draw:style-name="gr39" draw:text-style-name="P13" draw:layer="layout" svg:width="1.493cm" svg:height="0.797cm" svg:x="33.067cm" svg:y="2.905cm">
          <draw:text-box>
            <text:p>Yes</text:p>
          </draw:text-box>
        </draw:frame>
        <draw:frame draw:style-name="gr14" draw:text-style-name="P13" draw:layer="layout" svg:width="1.107cm" svg:height="0.797cm" svg:x="34.02cm" svg:y="1.317cm">
          <draw:text-box>
            <text:p>No</text:p>
          </draw:text-box>
        </draw:frame>
        <draw:connector draw:style-name="gr40" draw:text-style-name="P16" draw:layer="layout" draw:line-skew="2.025cm" svg:x1="34.337cm" svg:y1="2.1cm" svg:x2="21.134cm" svg:y2="7.512cm" draw:start-shape="id17" draw:start-glue-point="7" draw:end-shape="id20" draw:end-glue-point="7" svg:d="M34337 2100h2540v5412h-15743" svg:viewBox="0 0 15744 541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end="Arrowheads_20_4" draw:marker-end-width="0.305cm" svg:stroke-opacity="100%" draw:stroke-linejoin="none" svg:stroke-linecap="but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7:08:06.634552619</meta:creation-date>
    <dc:date>2026-01-07T19:59:21.596646195</dc:date>
    <meta:editing-duration>PT23M3S</meta:editing-duration>
    <meta:editing-cycles>6</meta:editing-cycles>
    <meta:generator>LibreOffice/25.8.1.1$Linux_X86_64 LibreOffice_project/580$Build-1</meta:generator>
    <meta:document-statistic meta:object-count="51"/>
  </office:meta>
</office:document-meta>
</file>