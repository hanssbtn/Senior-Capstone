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opacity="0%" draw:textarea-vertical-align="middle" draw:auto-grow-height="false" fo:min-height="2.559cm" fo:min-width="5.092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709cm" fo:min-width="3.78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918cm" fo:min-width="2.4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objectwithoutfill">
      <style:graphic-properties draw:opacity="0%" draw:textarea-vertical-align="middle" draw:auto-grow-height="false" fo:min-height="2.425cm" fo:min-width="4.77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3cm" fo:min-width="0.604cm" loext:decorative="false"/>
      <style:paragraph-properties style:writing-mode="lr-tb"/>
    </style:style>
    <style:style style:name="gr7" style:family="graphic" style:parent-style-name="objectwithoutfill">
      <style:graphic-properties draw:opacity="0%" draw:textarea-vertical-align="middle" draw:auto-grow-height="false" fo:min-height="1.428cm" fo:min-width="2.65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.71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.72cm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756cm" fo:min-width="1.9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.638cm" fo:min-width="3.786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textarea-vertical-align="middle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3.097cm" fo:min-width="2.85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882cm" fo:min-width="2.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604cm" loext:decorative="false"/>
      <style:paragraph-properties style:writing-mode="lr-tb"/>
    </style:style>
    <style:style style:name="gr18" style:family="graphic" style:parent-style-name="objectwithoutfill">
      <style:graphic-properties draw:opacity="0%" draw:textarea-vertical-align="middle" draw:auto-grow-height="false" fo:min-height="2.426cm" fo:min-width="4.78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opacity="0%" draw:textarea-vertical-align="middle" draw:auto-grow-height="false" fo:min-height="2.426cm" fo:min-width="4.564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898cm" fo:min-width="2.8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>
      <style:graphic-properties draw:textarea-vertical-align="middle" loext:decorative="false"/>
    </style:style>
    <style:style style:name="gr22" style:family="graphic" style:parent-style-name="objectwithoutfill">
      <style:graphic-properties draw:opacity="0%" draw:textarea-vertical-align="middle" draw:auto-grow-height="false" fo:min-height="1.553cm" fo:min-width="5.891cm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2.051cm" fo:min-width="2.08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6" style:family="graphic" style:parent-style-name="standard">
      <style:graphic-properties draw:start-line-spacing-vertical="1.194cm" draw:end-line-spacing-vertical="10.008cm" loext:decorative="false"/>
    </style:style>
    <style:style style:name="gr27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891cm" fo:min-width="2.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2.426cm" fo:min-width="2.2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4" style:family="graphic" style:parent-style-name="standard">
      <style:graphic-properties draw:textarea-vertical-align="middle" draw:start-line-spacing-vertical="0.762cm" draw:end-line-spacing-vertical="1.626cm" loext:decorative="false"/>
    </style:style>
    <style:style style:name="gr3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Times New Roman1" fo:font-size="18pt"/>
    </style:style>
    <style:style style:name="P2" style:family="paragraph">
      <loext:graphic-properties draw:opacity="0%"/>
      <style:paragraph-properties fo:text-align="center" style:writing-mode="lr-tb"/>
      <style:text-properties style:font-name="Times New Roman1" fo:font-size="18pt"/>
    </style:style>
    <style:style style:name="P3" style:family="paragraph">
      <loext:graphic-properties draw:fill="none"/>
      <style:paragraph-properties fo:text-align="center"/>
      <style:text-properties style:font-name="Times New Roman1"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42cm" fo:margin-bottom="0.35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en" fo:country="GB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opacity="0%"/>
      <style:paragraph-properties fo:margin-left="0cm" fo:margin-right="0cm" fo:margin-top="0.42cm" fo:margin-bottom="0.35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style:font-name="Times New Roman1" fo:font-size="18pt"/>
    </style:style>
    <style:style style:name="P9" style:family="paragraph">
      <loext:graphic-properties draw:fill="none" draw:fill-color="#ffffff"/>
      <style:text-properties style:font-name="Times New Roman1"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style:font-name="Times New Roman1" fo:font-size="18pt" style:font-size-asian="14pt" style:font-size-complex="14pt"/>
    </style:style>
    <style:style style:name="P13" style:family="paragraph">
      <loext:graphic-properties draw:opacity="0%"/>
      <style:paragraph-properties fo:text-align="center" style:writing-mode="lr-tb"/>
      <style:text-properties style:font-name="Times New Roman1" fo:font-size="18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592cm" svg:height="2.809cm" svg:x="24.166cm" svg:y="2.071cm">
          <text:p text:style-name="P1"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text:span text:style-name="T1"> </text:span><text:span text:style-name="T1">b</text:span><text:span text:style-name="T1">o</text:span><text:span text:style-name="T1">u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b</text:span><text:span text:style-name="T1">o</text:span><text:span text:style-name="T1">x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O</text:span><text:span text:style-name="T1">C</text:span><text:span text:style-name="T1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22.357cm" svg:y1="3.448cm" svg:x2="24.166cm" svg:y2="3.476cm" draw:start-shape="id1" draw:end-shape="id2" draw:end-glue-point="5" svg:d="M22357 3448h908v28h901" svg:viewBox="0 0 1810 29">
          <text:p/>
        </draw:connector>
        <draw:custom-shape draw:name="Start-End" draw:style-name="gr3" draw:text-style-name="P5" xml:id="id15" draw:id="id15" draw:layer="layout" svg:width="4.752cm" svg:height="2.775cm" svg:x="30.904cm" svg:y="16.806cm">
          <text:p text:style-name="P4"><text:span text:style-name="T2">En</text:span><text:span text:style-name="T2">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4" draw:text-style-name="P7" xml:id="id10" draw:id="id10" draw:layer="layout" svg:width="5.801cm" svg:height="4.334cm" svg:x="9.733cm" svg:y="6.664cm">
          <text:p text:style-name="P6"><text:span text:style-name="T3">A</text:span><text:span text:style-name="T3">n</text:span><text:span text:style-name="T3">n</text:span><text:span text:style-name="T3">ot</text:span><text:span text:style-name="T3">at</text:span><text:span text:style-name="T3">io</text:span><text:span text:style-name="T3">n </text:span><text:span text:style-name="T3"><text:line-break/></text:span><text:span text:style-name="T3">fo</text:span><text:span text:style-name="T3">r</text:span><text:span text:style-name="T3">m</text:span><text:span text:style-name="T3">at </text:span><text:span text:style-name="T3">v</text:span><text:span text:style-name="T3">al</text:span><text:span text:style-name="T3">id </text:span><text:span text:style-name="T3"><text:line-break/></text:span><text:span text:style-name="T3">a</text:span><text:span text:style-name="T3">n</text:span><text:span text:style-name="T3">d </text:span><text:span text:style-name="T3">ac</text:span><text:span text:style-name="T3">c</text:span><text:span text:style-name="T3">ur</text:span><text:span text:style-name="T3">at</text:span><text:span text:style-name="T3">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11" draw:id="id11" draw:layer="layout" svg:width="5.279cm" svg:height="2.675cm" svg:x="6.588cm" svg:y="12.953cm">
          <text:p text:style-name="P1"><text:span text:style-name="T1">E</text:span><text:span text:style-name="T1">d</text:span><text:span text:style-name="T1">it </text:span><text:span text:style-name="T1">A</text:span><text:span text:style-name="T1">n</text:span><text:span text:style-name="T1">n</text:span><text:span text:style-name="T1">o</text:span><text:span text:style-name="T1">t</text:span><text:span text:style-name="T1">a</text:span><text:span text:style-name="T1">ti</text:span><text:span text:style-name="T1">o</text:span><text:span text:style-name="T1">n </text:span><text:span text:style-name="T1">M</text:span><text:span text:style-name="T1">a</text:span><text:span text:style-name="T1">n</text:span><text:span text:style-name="T1">u</text:span><text:span text:style-name="T1">a</text:span><text:span text:style-name="T1">ll</text:span><text:span text:style-name="T1">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9" draw:layer="layout" svg:width="1.523cm" svg:height="0.954cm" svg:x="8.762cm" svg:y="7.589cm">
          <draw:text-box>
            <text:p text:style-name="P8">No</text:p>
          </draw:text-box>
        </draw:frame>
        <draw:custom-shape draw:style-name="gr7" draw:text-style-name="P2" xml:id="id13" draw:id="id13" draw:layer="layout" svg:width="3.156cm" svg:height="1.678cm" svg:x="26.805cm" svg:y="13.436cm">
          <text:p text:style-name="P1"><text:span text:style-name="T1">Add to </text:span><text:span text:style-name="T1">data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2.033cm" svg:height="1.68cm" svg:x="24.782cm" svg:y="12.898cm">
          <draw:text-box>
            <text:p text:style-name="P8">Yes</text:p>
          </draw:text-box>
        </draw:frame>
        <draw:frame draw:style-name="gr9" draw:text-style-name="P9" draw:layer="layout" svg:width="2.035cm" svg:height="1.68cm" svg:x="12.617cm" svg:y="10.842cm">
          <draw:text-box>
            <text:p text:style-name="P8">Yes</text:p>
          </draw:text-box>
        </draw:frame>
        <draw:custom-shape draw:name="Data 2" draw:style-name="gr10" draw:text-style-name="P11" xml:id="id14" draw:id="id14" draw:layer="layout" svg:width="3.97cm" svg:height="2.006cm" svg:x="31.318cm" svg:y="13.277cm">
          <text:p text:style-name="P10"><text:span text:style-name="T3">A</text:span><text:span text:style-name="T3">n</text:span><text:span text:style-name="T3">n</text:span><text:span text:style-name="T3">ot</text:span><text:span text:style-name="T3">at</text:span><text:span text:style-name="T3">e</text:span><text:span text:style-name="T3">d </text:span><text:span text:style-name="T3"><text:line-break/></text:span><text:span text:style-name="T3">S</text:span><text:span text:style-name="T3">T</text:span><text:span text:style-name="T3">E</text:span><text:span text:style-name="T3">P </text:span><text:span text:style-name="T3">F</text:span><text:span text:style-name="T3">il</text:span><text:span text:style-name="T3">e</text:span><text:span text:style-name="T3">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3" draw:layer="layout" draw:type="line" svg:x1="29.758cm" svg:y1="3.476cm" svg:x2="31.097cm" svg:y2="3.464cm" draw:start-shape="id2" draw:start-glue-point="7" draw:end-shape="id3" draw:end-glue-point="5" svg:d="M29758 3476l1339-12" svg:viewBox="0 0 1340 13">
          <text:p/>
        </draw:connector>
        <draw:custom-shape draw:style-name="gr12" draw:text-style-name="P13" xml:id="id4" draw:id="id4" draw:layer="layout" svg:width="4.752cm" svg:height="2.676cm" svg:x="3.879cm" svg:y="2.117cm">
          <text:p text:style-name="P12"><text:span text:style-name="T1">S</text:span><text:span text:style-name="T1">ta</text:span><text:span text:style-name="T1">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" draw:layer="layout" draw:type="line" svg:x1="8.631cm" svg:y1="3.455cm" svg:x2="10.888cm" svg:y2="3.45cm" draw:start-shape="id4" draw:start-glue-point="7" draw:end-shape="id5" draw:end-glue-point="6" svg:d="M8631 3455l2257-5" svg:viewBox="0 0 2258 6">
          <text:p/>
        </draw:connector>
        <draw:custom-shape draw:name="Data 3" draw:style-name="gr14" draw:text-style-name="P11" xml:id="id5" draw:id="id5" draw:layer="layout" svg:width="5.519cm" svg:height="3.346cm" svg:x="10.336cm" svg:y="1.777cm">
          <text:p text:style-name="P10"><text:span text:style-name="T3">R</text:span><text:span text:style-name="T3">a</text:span><text:span text:style-name="T3">w </text:span><text:span text:style-name="T3">S</text:span><text:span text:style-name="T3">T</text:span><text:span text:style-name="T3">E</text:span><text:span text:style-name="T3">P</text:span><text:span text:style-name="T3"><text:line-break/></text:span><text:span text:style-name="T3">Fi</text:span><text:span text:style-name="T3">le</text:span><text:span text:style-name="T3">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3" draw:layer="layout" draw:type="line" svg:x1="15.293cm" svg:y1="3.45cm" svg:x2="17.077cm" svg:y2="3.449cm" draw:start-shape="id5" draw:start-glue-point="9" draw:end-shape="id1" draw:end-glue-point="5" svg:d="M15293 3450l1784-1" svg:viewBox="0 0 1785 2">
          <text:p/>
        </draw:connector>
        <draw:custom-shape draw:name="Decision 5" draw:style-name="gr16" draw:text-style-name="P11" xml:id="id1" draw:id="id1" draw:layer="layout" svg:width="5.28cm" svg:height="4.263cm" svg:x="17.077cm" svg:y="1.317cm">
          <text:p text:style-name="P10"><text:span text:style-name="T3">File size</text:span><text:span text:style-name="T3"><text:line-break/></text:span><text:span text:style-name="T3">&lt; 2.5 MB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9" draw:layer="layout" svg:width="2.034cm" svg:height="1.68cm" svg:x="21.908cm" svg:y="2.315cm">
          <draw:text-box>
            <text:p text:style-name="P8">Yes</text:p>
          </draw:text-box>
        </draw:frame>
        <draw:frame draw:style-name="gr17" draw:text-style-name="P9" draw:layer="layout" svg:width="1.758cm" svg:height="1.349cm" svg:x="18.272cm" svg:y="5.238cm">
          <draw:text-box>
            <text:p text:style-name="P8">No</text:p>
          </draw:text-box>
        </draw:frame>
        <draw:custom-shape draw:style-name="gr18" draw:text-style-name="P2" xml:id="id9" draw:id="id9" draw:layer="layout" svg:width="5.28cm" svg:height="2.676cm" svg:x="3.163cm" svg:y="16.914cm">
          <text:p text:style-name="P1"><text:span text:style-name="T1">D</text:span><text:span text:style-name="T1">is</text:span><text:span text:style-name="T1">ca</text:span><text:span text:style-name="T1">rd </text:span><text:span text:style-name="T1">fr</text:span><text:span text:style-name="T1">o</text:span><text:span text:style-name="T1">m </text:span><text:span text:style-name="T1">d</text:span><text:span text:style-name="T1">at</text:span><text:span text:style-name="T1">as</text:span><text:span text:style-name="T1">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2" xml:id="id3" draw:id="id3" draw:layer="layout" svg:width="5.064cm" svg:height="2.676cm" svg:x="31.097cm" svg:y="2.126cm">
          <text:p text:style-name="P1"><text:span text:style-name="T1">Re</text:span><text:span text:style-name="T1">nd</text:span><text:span text:style-name="T1">er </text:span><text:span text:style-name="T1">im</text:span><text:span text:style-name="T1">ag</text:span><text:span text:style-name="T1">es </text:span><text:span text:style-name="T1">fro</text:span><text:span text:style-name="T1">m </text:span><text:span text:style-name="T1">7 </text:span><text:span text:style-name="T1">dif</text:span><text:span text:style-name="T1">fer</text:span><text:span text:style-name="T1">ent </text:span><text:span text:style-name="T1">vie</text:span><text:span text:style-name="T1">wp</text:span><text:span text:style-name="T1">oin</text:span><text:span text:style-name="T1">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4" draw:style-name="gr20" draw:text-style-name="P11" xml:id="id6" draw:id="id6" draw:layer="layout" svg:width="5.439cm" svg:height="2.147cm" svg:x="30.881cm" svg:y="7.727cm">
          <text:p text:style-name="P10"><text:span text:style-name="T3">CAD </text:span><text:span text:style-name="T3">images</text:span><text:span text:style-name="T3"><text:line-break/></text:span><text:span text:style-name="T3">from </text:span><text:span text:style-name="T3">STEP </text:span><text:span text:style-name="T3">fil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1" draw:layer="layout" draw:type="lines" svg:x1="33.629cm" svg:y1="4.802cm" svg:x2="33.6cm" svg:y2="7.727cm" draw:start-shape="id3" draw:start-glue-point="6" draw:end-shape="id6" draw:end-glue-point="5" svg:d="M33629 4802v510l-29 1891v524" svg:viewBox="0 0 30 2926">
          <text:p/>
        </draw:connector>
        <draw:custom-shape draw:style-name="gr22" draw:text-style-name="P2" xml:id="id7" draw:id="id7" draw:layer="layout" svg:width="6.391cm" svg:height="1.803cm" svg:x="23.518cm" svg:y="7.904cm">
          <text:p text:style-name="P1"><text:span text:style-name="T1">Gene</text:span><text:span text:style-name="T1">rate </text:span><text:span text:style-name="T1">annot</text:span><text:span text:style-name="T1">ation </text:span><text:span text:style-name="T1">using </text:span><text:span text:style-name="T1">Qwen</text:span><text:span text:style-name="T1">2.5-</text:span><text:span text:style-name="T1">VL-7</text:span><text:span text:style-name="T1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5" draw:style-name="gr23" draw:text-style-name="P11" xml:id="id8" draw:id="id8" draw:layer="layout" svg:width="4.254cm" svg:height="2.3cm" svg:x="17.512cm" svg:y="7.682cm">
          <text:p text:style-name="P10"><text:span text:style-name="T3">Annotat</text:span><text:span text:style-name="T3">ed</text:span><text:span text:style-name="T3"><text:line-break/></text:span><text:span text:style-name="T3">CAD </text:span><text:span text:style-name="T3">fil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4" draw:text-style-name="P3" draw:layer="layout" draw:type="line" svg:x1="23.518cm" svg:y1="8.806cm" svg:x2="21.333cm" svg:y2="8.832cm" draw:start-shape="id7" draw:start-glue-point="5" draw:end-shape="id8" draw:end-glue-point="9" svg:d="M23518 8806l-2185 26" svg:viewBox="0 0 2186 27">
          <text:p/>
        </draw:connector>
        <draw:connector draw:style-name="gr25" draw:text-style-name="P3" draw:layer="layout" draw:type="line" svg:x1="31.425cm" svg:y1="8.801cm" svg:x2="29.909cm" svg:y2="8.806cm" draw:start-shape="id6" draw:start-glue-point="6" draw:end-shape="id7" draw:end-glue-point="7" svg:d="M31425 8801l-1516 5" svg:viewBox="0 0 1517 6">
          <text:p/>
        </draw:connector>
        <draw:connector draw:style-name="gr26" draw:text-style-name="P8" draw:layer="layout" draw:type="lines" draw:line-skew="-0.61cm -0.737cm" svg:x1="19.717cm" svg:y1="5.58cm" svg:x2="5.803cm" svg:y2="16.914cm" draw:start-shape="id1" draw:start-glue-point="6" draw:end-shape="id9" draw:end-glue-point="4" svg:d="M19717 5580v599l-13914-11v10746" svg:viewBox="0 0 13915 11335">
          <text:p/>
        </draw:connector>
        <draw:connector draw:style-name="gr27" draw:text-style-name="P3" draw:layer="measurelines" draw:type="line" svg:x1="17.937cm" svg:y1="8.832cm" svg:x2="15.534cm" svg:y2="8.831cm" draw:start-shape="id8" draw:start-glue-point="6" draw:end-shape="id10" draw:end-glue-point="7" svg:d="M17937 8832l-2403-1" svg:viewBox="0 0 2404 2">
          <text:p/>
        </draw:connector>
        <draw:custom-shape draw:name="Decision 2" draw:style-name="gr28" draw:text-style-name="P7" xml:id="id16" draw:id="id16" draw:layer="measurelines" svg:width="5.8cm" svg:height="4.281cm" svg:x="19.51cm" svg:y="12.15cm">
          <text:p text:style-name="P6"><text:span text:style-name="T3">Appro</text:span><text:span text:style-name="T3">ved by</text:span><text:span text:style-name="T3"><text:line-break/></text:span><text:span text:style-name="T3">human </text:span><text:span text:style-name="T3">exper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 1" draw:style-name="gr29" draw:text-style-name="P11" xml:id="id12" draw:id="id12" draw:layer="measurelines" svg:width="4.464cm" svg:height="2.675cm" svg:x="14.267cm" svg:y="12.953cm">
          <text:p text:style-name="P10"><text:span text:style-name="T3">Manually </text:span><text:span text:style-name="T3"><text:line-break/></text:span><text:span text:style-name="T3">annotated </text:span><text:span text:style-name="T3"><text:line-break/></text:span><text:span text:style-name="T3">STEP fil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1" draw:layer="measurelines" draw:type="line" svg:x1="11.867cm" svg:y1="14.291cm" svg:x2="14.713cm" svg:y2="14.291cm" draw:start-shape="id11" draw:start-glue-point="7" draw:end-shape="id12" draw:end-glue-point="6" svg:d="M11867 14291h2846" svg:viewBox="0 0 2847 1">
          <text:p/>
        </draw:connector>
        <draw:connector draw:style-name="gr30" draw:text-style-name="P3" draw:layer="measurelines" draw:type="line" svg:x1="29.961cm" svg:y1="14.275cm" svg:x2="31.715cm" svg:y2="14.28cm" draw:start-shape="id13" draw:start-glue-point="7" draw:end-shape="id14" draw:end-glue-point="6" svg:d="M29961 14275l1754 5" svg:viewBox="0 0 1755 6">
          <text:p/>
        </draw:connector>
        <draw:connector draw:style-name="gr31" draw:text-style-name="P3" draw:layer="measurelines" draw:type="line" svg:x1="33.303cm" svg:y1="15.283cm" svg:x2="33.28cm" svg:y2="16.806cm" draw:start-shape="id14" draw:start-glue-point="8" draw:end-shape="id15" draw:end-glue-point="4" svg:d="M33303 15283l-23 1523" svg:viewBox="0 0 24 1524">
          <text:p/>
        </draw:connector>
        <draw:connector draw:style-name="gr32" draw:text-style-name="P3" draw:layer="measurelines" draw:type="line" svg:x1="18.277cm" svg:y1="14.291cm" svg:x2="19.51cm" svg:y2="14.291cm" draw:start-shape="id12" draw:start-glue-point="9" draw:end-shape="id16" draw:end-glue-point="5" svg:d="M18277 14291h1233" svg:viewBox="0 0 1234 1">
          <text:p/>
        </draw:connector>
        <draw:connector draw:style-name="gr33" draw:text-style-name="P3" draw:layer="measurelines" draw:type="line" svg:x1="25.31cm" svg:y1="14.291cm" svg:x2="26.805cm" svg:y2="14.275cm" draw:start-shape="id16" draw:start-glue-point="7" draw:end-shape="id13" draw:end-glue-point="5" svg:d="M25310 14291l1495-16" svg:viewBox="0 0 1496 17">
          <text:p/>
        </draw:connector>
        <draw:connector draw:style-name="gr34" draw:text-style-name="P1" draw:layer="measurelines" draw:type="lines" svg:x1="12.634cm" svg:y1="10.998cm" svg:x2="28.383cm" svg:y2="13.436cm" draw:start-shape="id10" draw:start-glue-point="6" draw:end-shape="id13" draw:end-glue-point="4" svg:d="M12634 10998v778l15749 33v1627" svg:viewBox="0 0 15750 2439">
          <text:p/>
        </draw:connector>
        <draw:connector draw:style-name="gr21" draw:text-style-name="P1" draw:layer="measurelines" draw:type="lines" svg:x1="8.443cm" svg:y1="18.252cm" svg:x2="30.904cm" svg:y2="18.194cm" draw:start-shape="id9" draw:start-glue-point="7" draw:end-shape="id15" draw:end-glue-point="5" svg:d="M8443 18252h502l21436-58h523" svg:viewBox="0 0 22462 59">
          <text:p/>
        </draw:connector>
        <draw:connector draw:style-name="gr35" draw:text-style-name="P14" draw:layer="measurelines" draw:type="lines" svg:x1="9.733cm" svg:y1="8.831cm" svg:x2="9.228cm" svg:y2="12.953cm" draw:start-shape="id10" draw:start-glue-point="5" draw:end-shape="id11" draw:end-glue-point="4" svg:d="M9733 8831h-516l11 3612v510" svg:viewBox="0 0 517 41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8" draw:display-name="Arrowheads 18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="Arrowheads_20_22" draw:marker-end-width="0.305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tart-line-spacing-vertical="0.508cm" draw:end-line-spacing-horizontal="0.508cm" draw:end-line-spacing-vertical="0.508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end="Arrowheads_20_4" draw:marker-end-width="0.305cm" svg:stroke-opacity="100%" draw:stroke-linejoin="none"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8:06.634552619</meta:creation-date>
    <dc:date>2026-05-05T22:08:55.729333690</dc:date>
    <meta:editing-duration>PT37M19S</meta:editing-duration>
    <meta:editing-cycles>8</meta:editing-cycles>
    <meta:generator>LibreOffice/26.2.2.2$Linux_X86_64 LibreOffice_project/620$Build-2</meta:generator>
    <meta:document-statistic meta:object-count="38"/>
  </office:meta>
</office:document-meta>
</file>